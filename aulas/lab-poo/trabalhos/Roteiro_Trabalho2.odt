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  <style:text-properties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" style:parent-style-name="Normal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justify"/>
    </style:style>
    <style:style style:name="T9" style:parent-style-name="Fonteparág.padrão" style:family="text">
      <style:text-properties style:font-weight-complex="bold" fo:font-size="14pt" style:font-size-asian="14pt" style:font-size-complex="14pt"/>
    </style:style>
    <style:style style:name="T10" style:parent-style-name="Fonteparág.padrão" style:family="text">
      <style:text-properties fo:font-size="14pt" style:font-size-asian="14pt" style:font-size-complex="14pt"/>
    </style:style>
    <style:style style:name="T11" style:parent-style-name="Fonteparág.padrão" style:family="text">
      <style:text-properties fo:font-size="14pt" style:font-size-asian="14pt" style:font-size-complex="14pt"/>
    </style:style>
    <style:style style:name="T12" style:parent-style-name="Fonteparág.padrão" style:family="text">
      <style:text-properties fo:font-size="14pt" style:font-size-asian="14pt" style:font-size-complex="14pt"/>
    </style:style>
    <style:style style:name="T13" style:parent-style-name="Fonteparág.padrão" style:family="text">
      <style:text-properties fo:font-size="14pt" style:font-size-asian="14pt" style:font-size-complex="14pt"/>
    </style:style>
    <style:style style:name="T14" style:parent-style-name="Fonteparág.padrão" style:family="text">
      <style:text-properties fo:font-size="14pt" style:font-size-asian="14pt" style:font-size-complex="14pt"/>
    </style:style>
    <style:style style:name="T15" style:parent-style-name="Fonteparág.padrão" style:family="text">
      <style:text-properties fo:font-size="14pt" style:font-size-asian="14pt" style:font-size-complex="14pt"/>
    </style:style>
    <style:style style:name="P1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7" style:parent-style-name="Normal" style:family="paragraph">
      <style:paragraph-properties fo:text-align="justify"/>
    </style:style>
    <style:style style:name="T18" style:parent-style-name="Fonteparág.padrão" style:family="text">
      <style:text-properties fo:font-size="14pt" style:font-size-asian="14pt" style:font-size-complex="14pt"/>
    </style:style>
    <style:style style:name="T19" style:parent-style-name="Fonteparág.padrão" style:family="text">
      <style:text-properties fo:font-size="14pt" style:font-size-asian="14pt" style:font-size-complex="14pt"/>
    </style:style>
    <style:style style:name="T20" style:parent-style-name="Fonteparág.padrão" style:family="text">
      <style:text-properties fo:font-size="14pt" style:font-size-asian="14pt" style:font-size-complex="14pt"/>
    </style:style>
    <style:style style:name="T21" style:parent-style-name="Fonteparág.padrão" style:family="text">
      <style:text-properties fo:font-size="14pt" style:font-size-asian="14pt" style:font-size-complex="14pt"/>
    </style:style>
    <style:style style:name="T22" style:parent-style-name="Fonteparág.padrão" style:family="text">
      <style:text-properties fo:font-size="14pt" style:font-size-asian="14pt" style:font-size-complex="14pt"/>
    </style:style>
    <style:style style:name="P23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8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30" style:parent-style-name="Normal" style:family="paragraph">
      <style:paragraph-properties fo:text-align="justify"/>
    </style:style>
    <style:style style:name="T31" style:parent-style-name="Fonteparág.padrão" style:family="text">
      <style:text-properties style:font-weight-complex="bold" fo:font-size="14pt" style:font-size-asian="14pt" style:font-size-complex="14pt"/>
    </style:style>
    <style:style style:name="T3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33" style:parent-style-name="Fonteparág.padrão" style:family="text">
      <style:text-properties style:font-weight-complex="bold" fo:font-size="14pt" style:font-size-asian="14pt" style:font-size-complex="14pt"/>
    </style:style>
    <style:style style:name="T34" style:parent-style-name="Fonteparág.padrão" style:family="text">
      <style:text-properties style:font-weight-complex="bold" fo:font-size="14pt" style:font-size-asian="14pt" style:font-size-complex="14pt"/>
    </style:style>
    <style:style style:name="P35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6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text-align="justify"/>
    </style:style>
    <style:style style:name="T38" style:parent-style-name="Fonteparág.padrão" style:family="text">
      <style:text-properties style:font-weight-complex="bold" fo:font-size="14pt" style:font-size-asian="14pt" style:font-size-complex="14pt"/>
    </style:style>
    <style:style style:name="T39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Fonteparág.padrão" style:family="text">
      <style:text-properties style:font-weight-complex="bold" fo:font-size="14pt" style:font-size-asian="14pt" style:font-size-complex="14pt"/>
    </style:style>
    <style:style style:name="P41" style:parent-style-name="Normal" style:family="paragraph">
      <style:paragraph-properties fo:text-align="justify"/>
    </style:style>
    <style:style style:name="T42" style:parent-style-name="Fonteparág.padrão" style:family="text">
      <style:text-properties style:font-weight-complex="bold" fo:font-size="14pt" style:font-size-asian="14pt" style:font-size-complex="14pt"/>
    </style:style>
    <style:style style:name="T4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44" style:parent-style-name="Fonteparág.padrão" style:family="text">
      <style:text-properties style:font-weight-complex="bold" fo:font-size="14pt" style:font-size-asian="14pt" style:font-size-complex="14pt"/>
    </style:style>
    <style:style style:name="T45" style:parent-style-name="Fonteparág.padrão" style:family="text">
      <style:text-properties style:font-weight-complex="bold" fo:font-size="14pt" style:font-size-asian="14pt" style:font-size-complex="14pt"/>
    </style:style>
    <style:style style:name="P46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49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0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1" style:parent-style-name="Normal" style:family="paragraph">
      <style:paragraph-properties fo:text-align="justify"/>
    </style:style>
    <style:style style:name="T5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53" style:parent-style-name="Fonteparág.padrão" style:family="text">
      <style:text-properties fo:font-size="14pt" style:font-size-asian="14pt" style:font-size-complex="14pt"/>
    </style:style>
    <style:style style:name="T54" style:parent-style-name="Fonteparág.padrão" style:family="text">
      <style:text-properties fo:font-size="14pt" style:font-size-asian="14pt" style:font-size-complex="14pt"/>
    </style:style>
    <style:style style:name="T55" style:parent-style-name="Fonteparág.padrão" style:family="text">
      <style:text-properties fo:font-size="14pt" style:font-size-asian="14pt" style:font-size-complex="14pt"/>
    </style:style>
    <style:style style:name="P56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5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0" style:parent-style-name="Normal" style:family="paragraph">
      <style:paragraph-properties fo:text-align="justify"/>
    </style:style>
    <style:style style:name="T61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62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6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64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P6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7" style:parent-style-name="Normal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6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1" style:parent-style-name="Normal" style:family="paragraph">
      <style:paragraph-properties fo:text-align="justify"/>
    </style:style>
    <style:style style:name="T72" style:parent-style-name="Fonteparág.padrão" style:family="text">
      <style:text-properties fo:font-size="14pt" style:font-size-asian="14pt" style:font-size-complex="14pt"/>
    </style:style>
    <style:style style:name="T73" style:parent-style-name="Fonteparág.padrão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Roteiro para Avaliação do Trabalho 2<text:s/>de Lab. PC2</text:p>
      <text:p text:style-name="P2"/>
      <text:p text:style-name="P3">1.<text:s/>Incluir novo<text:s/>cliente pessoa física</text:p>
      <text:p text:style-name="P4">CPF: 092.456.731-27 /<text:s/>Theo<text:s/>Cunha<text:s/>/ 31 99154-7590 /<text:s/>30 anos</text:p>
      <text:p text:style-name="P5">Endereço: Rua das Flores, 610 – Bairro Cidade Jardim, Nova Lima</text:p>
      <text:p text:style-name="P6"/>
      <text:p text:style-name="P7">2. Incluir novo cliente pessoa jurídica</text:p>
      <text:p text:style-name="P8"><text:span text:style-name="T9">CNPJ:<text:s/></text:span><text:span text:style-name="T10">48.090.146/0001-00</text:span><text:span text:style-name="T11"><text:s/>/ Unimed-BH /<text:s/></text:span><text:span text:style-name="T12">31 3229</text:span><text:span text:style-name="T13">-</text:span><text:span text:style-name="T14">5152</text:span><text:span text:style-name="T15"><text:s/></text:span></text:p>
      <text:p text:style-name="P16">Razão Social:<text:s/>UNIMED-BH<text:s/>COOPERATIVA DE TRABALHO MEDICO</text:p>
      <text:p text:style-name="P17"><text:span text:style-name="T18">Endereço:<text:s/></text:span><text:span text:style-name="T19">Rua dos Inconfidentes, 44 - Funcion</text:span><text:span text:style-name="T20">á</text:span><text:span text:style-name="T21">rios, BH, MG</text:span><text:span text:style-name="T22">.</text:span></text:p>
      <text:p text:style-name="P23"/>
      <text:p text:style-name="P24">3. Incluir novo<text:s/>veículo</text:p>
      <text:p text:style-name="P25">RENAVAM (11 dígitos):<text:s/>12345678901</text:p>
      <text:p text:style-name="P26">Modelo: Fiat Argo 1.0 Flex Automático / Concessionária: Fiat / Quilometragem: 20546 / Ano<text:s/>de fabricação: 2024 / Cor: Branca</text:p>
      <text:p text:style-name="P27"/>
      <text:p text:style-name="P28">4. Incluir<text:s/>locação de veículo para cliente pessoa física<text:s/>“Theo”</text:p>
      <text:p text:style-name="P29">- Diárias: 7 dias / Data: 08/05/26 Hora: 15:30<text:s/>até 15/05/26 12:00</text:p>
      <text:p text:style-name="P30"><text:span text:style-name="T31">-</text:span><text:span text:style-name="T32"><text:s/></text:span><text:span text:style-name="T33">Carro: Fiat Argo cadastrado<text:s/></text:span><text:span text:style-name="T34">na Etapa 3</text:span></text:p>
      <text:p text:style-name="P35"/>
      <text:p text:style-name="P36">5. Incluir locação de veículo para cliente pessoa jurídica<text:s/>“Unimed”</text:p>
      <text:p text:style-name="P37"><text:span text:style-name="T38">-</text:span><text:span text:style-name="T39"><text:s/></text:span><text:span text:style-name="T40">Diárias: 10 dias / Data: 20/05/26 Hora: 10:00 até 30/05/26 12:00</text:span></text:p>
      <text:p text:style-name="P41"><text:span text:style-name="T42">- Carro:</text:span><text:span text:style-name="T43"><text:s/></text:span><text:span text:style-name="T44">Fiat A</text:span><text:span text:style-name="T45">rgo cadastrado na Etapa 3</text:span></text:p>
      <text:p text:style-name="P46"/>
      <text:p text:style-name="P47">6.<text:s/>Finalizar locação de veículo para cliente pessoa física<text:s/>“Theo”</text:p>
      <text:p text:style-name="P48">- O sistema deverá excluir as locações abertas associadas a essa pessoa física.</text:p>
      <text:p text:style-name="P49"/>
      <text:p text:style-name="P50">7. Consultar os<text:s/>veículos</text:p>
      <text:p text:style-name="P51"><text:span text:style-name="T52"><text:s/></text:span><text:span text:style-name="T53">- Exibir<text:s/></text:span><text:span text:style-name="T54">todos os dados do veículo Fiat Argo adicionado na Etapa 3.</text:span><text:span text:style-name="T55"><text:s text:c="2"/></text:span></text:p>
      <text:p text:style-name="P56"/>
      <text:p text:style-name="P57">8. Consultar<text:s/>os clientes</text:p>
      <text:p text:style-name="P58">-<text:s/>Exibir as informações (dados de cadastro) do “Theo” e da “Unimed”</text:p>
      <text:p text:style-name="P59"/>
      <text:p text:style-name="P60"><text:span text:style-name="T61">9</text:span><text:span text:style-name="T62">.<text:s/></text:span><text:span text:style-name="T63">Consultar as locações ativas</text:span><text:span text:style-name="T64">:</text:span></text:p>
      <text:p text:style-name="P65">- Exibir somente<text:s/>a locação para a empresa<text:s/>Unimed, uma vez que a outra<text:s/>locação para o cliente Theo já foi finalizada.<text:s/>Além disso, é importante dizer se esta locação está ativa ou está encerrada.</text:p>
      <text:p text:style-name="P66"/>
      <text:p text:style-name="P67">10.<text:s/>Imprimir<text:s/>o valor total que o cliente<text:s/>“Theo”<text:s/>deverá<text:s/>pagar<text:s/>pelo seguro ao final da sua locação</text:p>
      <text:p text:style-name="P68">Cliente<text:s/>Pessoa Física: Theo</text:p>
      <text:p text:style-name="P69">-<text:s/>Valor diária para o cliente “Theo”: R$20,00 + (R$ 0,50 * 30) = R$ 35,00</text:p>
      <text:p text:style-name="P70">- Quantidade de<text:s/>Diárias: 7<text:s/></text:p>
      <text:p text:style-name="P71"><text:span text:style-name="T72">-<text:s/></text:span><text:span text:style-name="T73">Valor total: (7 * R$ 35,00) = R$ 245,00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 Cunha Campos</meta:initial-creator>
    <dc:creator>EDUARDO</dc:creator>
    <meta:creation-date>2024-11-08T14:35:00Z</meta:creation-date>
    <dc:date>2026-05-08T19:14:00Z</dc:date>
    <meta:template xlink:href="Normal" xlink:type="simple"/>
    <meta:editing-cycles>9</meta:editing-cycles>
    <meta:editing-duration>PT4440S</meta:editing-duration>
    <meta:document-statistic meta:page-count="2" meta:paragraph-count="3" meta:word-count="279" meta:character-count="1786" meta:row-count="12" meta:non-whitespace-character-count="1510"/>
  </office:meta>
</office:document-meta>
</file>